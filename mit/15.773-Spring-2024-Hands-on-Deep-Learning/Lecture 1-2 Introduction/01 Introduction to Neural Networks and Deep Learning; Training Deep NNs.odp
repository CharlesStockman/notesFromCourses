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26000002CBE0A10001.png" manifest:media-type="image/png"/>
  <manifest:file-entry manifest:full-path="Pictures/1000000100000526000002CB7ED54BED.png" manifest:media-type="image/png"/>
  <manifest:file-entry manifest:full-path="Pictures/1000000100000436000002AB33A17D09.png" manifest:media-type="image/png"/>
  <manifest:file-entry manifest:full-path="Pictures/10000001000003B30000027D29FEB6F5.png" manifest:media-type="image/png"/>
  <manifest:file-entry manifest:full-path="Pictures/10000001000002FE0000013BB1767EB8.png" manifest:media-type="image/png"/>
  <manifest:file-entry manifest:full-path="Pictures/100000010000014C000002CA202DFF6A.png" manifest:media-type="image/png"/>
  <manifest:file-entry manifest:full-path="Pictures/1000000100000576000002AD715B26AA.png" manifest:media-type="image/png"/>
  <manifest:file-entry manifest:full-path="Pictures/1000000100000246000000AFBB2C418E.png" manifest:media-type="image/png"/>
  <manifest:file-entry manifest:full-path="Pictures/1000000100000542000002AD5971A047.png" manifest:media-type="image/png"/>
  <manifest:file-entry manifest:full-path="Pictures/1000000100000526000002CB24E3E7D1.png" manifest:media-type="image/png"/>
  <manifest:file-entry manifest:full-path="Pictures/100000010000059D0000030A613E3AC6.png" manifest:media-type="image/png"/>
  <manifest:file-entry manifest:full-path="Pictures/1000000100000526000002CB20AB4EC7.png" manifest:media-type="image/png"/>
  <manifest:file-entry manifest:full-path="Pictures/1000000100000310000000566A2666B5.png" manifest:media-type="image/png"/>
  <manifest:file-entry manifest:full-path="Pictures/1000000100000252000001E4C6ED5C2A.png" manifest:media-type="image/png"/>
  <manifest:file-entry manifest:full-path="Pictures/10000001000003B3000002CB558575AA.png" manifest:media-type="image/png"/>
  <manifest:file-entry manifest:full-path="Pictures/100000010000014200000096E7CCAB7D.png" manifest:media-type="image/png"/>
  <manifest:file-entry manifest:full-path="Pictures/10000001000001350000018C4CEC6D37.png" manifest:media-type="image/png"/>
  <manifest:file-entry manifest:full-path="Pictures/100000010000055B000000BAEDADDCF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32pt"/>
    </style:style>
    <style:style style:name="P3" style:family="paragraph"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5cm" fo:margin-bottom="0cm"/>
    </style:style>
    <style:style style:name="T1" style:family="text">
      <style:text-properties fo:font-size="32pt" fo:font-weight="bold" style:font-size-asian="16pt" style:font-weight-asian="bold" style:font-size-complex="16pt" style:font-weight-complex="bold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Helvetica" fo:font-size="10pt" style:font-name-asian="Helvetica" style:font-size-asian="24pt" style:font-name-complex="Helvetica" style:font-size-complex="24pt"/>
    </style:style>
    <style:style style:name="T4" style:family="text">
      <style:text-properties fo:color="#151823" loext:opacity="100%" style:font-name="Liberation Sans" fo:font-size="10pt" fo:font-style="normal" fo:font-weight="normal" style:font-name-asian="ArialMT" style:font-size-asian="21pt" style:font-name-complex="ArialMT" style:font-size-complex="21pt"/>
    </style:style>
    <style:style style:name="T5" style:family="text">
      <style:text-properties fo:color="#fb0007" loext:opacity="100%" style:font-name="Liberation Sans" fo:font-size="10pt" fo:font-style="normal" fo:font-weight="normal" style:font-name-asian="ArialMT" style:font-size-asian="21pt" style:font-name-complex="ArialMT" style:font-size-complex="21pt"/>
    </style:style>
    <style:style style:name="T6" style:family="text">
      <style:text-properties style:font-name="Liberation Sans" fo:font-size="10pt" fo:font-style="normal" fo:font-weight="normal"/>
    </style:style>
    <style:style style:name="T7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1.555cm" svg:x="0.765cm" svg:y="4.195cm" presentation:class="outline" presentation:user-transformed="true">
          <draw:text-box>
            <text:list text:style-name="L2">
              <text:list-item>
                <text:p><text:span text:style-name="T2">image to right is breakthroughs in AI</text:span></text:p>
              </text:list-item>
              <text:list-item>
                <text:p><text:span text:style-name="T2">Breakthroughs </text:span></text:p>
                <text:list>
                  <text:list-item>
                    <text:p><text:span text:style-name="T2">Traditional AI</text:span></text:p>
                    <text:list>
                      <text:list-item>
                        <text:p><text:span text:style-name="T2">Goal – Give computers the ability to </text:span><text:span text:style-name="T2"><text:line-break/></text:span><text:span text:style-name="T2">do tasks that traditionally only humans</text:span><text:span text:style-name="T2"><text:line-break/></text:span><text:span text:style-name="T2">have been able to do.</text:span></text:p>
                      </text:list-item>
                      <text:list-item>
                        <text:p><text:span text:style-name="T2">Traditional Approach</text:span></text:p>
                        <text:list>
                          <text:list-item>
                            <text:p><text:span text:style-name="T2">Ask human experts</text:span></text:p>
                          </text:list-item>
                          <text:list-item>
                            <text:p><text:span text:style-name="T2">write down if/then rules</text:span></text:p>
                          </text:list-item>
                          <text:list-item>
                            <text:p><text:span text:style-name="T2">explicitly program rules into computer</text:span></text:p>
                          </text:list-item>
                          <text:list-item>
                            <text:p><text:span text:style-name="T2">Outcome – Success in few areas</text:span></text:p>
                            <text:list>
                              <text:list-item>
                                <text:p><text:span text:style-name="T2">Doesn’t generalize to new situations well ( if/then) rules </text:span></text:p>
                                <text:list>
                                  <text:list-item>
                                    <text:p><text:span text:style-name="T2">Cannot write down rules to cover all edge cases for all possible edge cases.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We know more than we can tell” (Polanyi’s Paradox)</text:span></text:p>
                                <text:list>
                                  <text:list-item>
                                    <text:p><text:span text:style-name="T3">We can do lots of things easily but find it very hard to </text:span><text:span text:style-name="T2">describe how exactly we do them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Machine Learning</text:span></text:p>
                    <text:list>
                      <text:list-item>
                        <text:p><text:span text:style-name="T2">Provide the computer with lots of examples of inputs-and-outputs and use statistical techniques to learn the relationship between inputs and outputs </text:span><text:span text:style-name="T2">( mapping)</text:span></text:p>
                        <text:list>
                          <text:list-item>
                            <text:p><text:span text:style-name="T2">Condensed – Learn from input/output examples using statistical techniques</text:span></text:p>
                          </text:list-item>
                        </text:list>
                      </text:list-item>
                      <text:list-item>
                        <text:p><text:span text:style-name="T2">Input Data is Structured ( text <text:s/>) 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6.005cm" svg:height="3.797cm" svg:x="11.43cm" svg:y="3.81cm">
          <draw:image xlink:href="Pictures/100000010000055B000000BAEDADDC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Unstructured Data ( Images, Text, Audio, videos )</text:span></text:p>
                        <text:list>
                          <text:list-item>
                            <text:p><text:span text:style-name="T2">Need to numeralize it </text:span></text:p>
                          </text:list-item>
                          <text:list-item>
                            <text:p><text:span text:style-name="T2">Raw form of data has no intrinsic meaning </text:span></text:p>
                            <text:list>
                              <text:list-item>
                                <text:p><text:span text:style-name="T2">Ex. Grass would be represented as the color ( green), but the values does not describe what it is.</text:span></text:p>
                              </text:list-item>
                              <text:list-item>
                                <text:p><text:span text:style-name="T2">Need to do feature engineering or feature extraction</text:span></text:p>
                                <text:list>
                                  <text:list-item>
                                    <text:p><text:span text:style-name="T2">Converts Unstructured data to structured data</text:span></text:p>
                                  </text:list-item>
                                  <text:list-item>
                                    <text:p><text:span text:style-name="T2">Also called representatio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Historically, researchers </text:span><text:span text:style-name="T5">manually</text:span><text:span text:style-name="T4"> developed these representations and </text:span><text:span text:style-name="T6">then fed them to traditional machine learning algorithms</text:span></text:p>
                                <text:list>
                                  <text:list-item>
                                    <text:p><text:span text:style-name="T6">Required massive human effort and thus sharply limited the reach of Machine Learning</text:span></text:p>
                                  </text:list-item>
                                  <text:list-item>
                                    <text:p><text:span text:style-name="T6">Required massive human effort ( human bottleneck ) which limited the reach of machine learning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Deep Learning</text:span></text:p>
                <text:list>
                  <text:list-item>
                    <text:p><text:span text:style-name="T6">Can handle representations without upfront manual processing</text:span></text:p>
                  </text:list-item>
                  <text:list-item>
                    <text:p><text:span text:style-name="T6">Example of Deep Learning Pipeline ( Led to chatgpt / alphafold ) <text:s/></text:span></text:p>
                    <text:list>
                      <text:list-item>
                        <text:p><text:span text:style-name="T6">automatically learn the right representations from the raw input ( automatically extract smart representations from raw unstructured data )</text:span></text:p>
                        <text:list>
                          <text:list-item>
                            <text:p><text:span text:style-name="T6">Can feed those smart representations to traditional models such as linear regression or logistic regression and achieve amazing performa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Demolishes the human bottleneck for using Machine Learning with Unstructured Data</text:span></text:p>
                  </text:list-item>
                  <text:list-item>
                    <text:p><text:span text:style-name="T6">Confluence of three items</text:span></text:p>
                    <text:list>
                      <text:list-item>
                        <text:p><text:span text:style-name="T6">New Algorithmic Ideas</text:span></text:p>
                      </text:list-item>
                      <text:list-item>
                        <text:p><text:span text:style-name="T6">Unprecedented amounts of data</text:span></text:p>
                      </text:list-item>
                      <text:list-item>
                        <text:p><text:span text:style-name="T6">GPUS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Application</text:span></text:p>
                    <text:list>
                      <text:list-item>
                        <text:p><text:span text:style-name="T2">Every sensor in the world can be given the ability to detect, recognize and classify what it is sensing.</text:span></text:p>
                        <text:list>
                          <text:list-item>
                            <text:p><text:span text:style-name="T2">A sensor is an receptacle for unstructured data</text:span></text:p>
                            <text:list>
                              <text:list-item>
                                <text:p><text:span text:style-name="T2">Ex. Camera – Still Images</text:span></text:p>
                              </text:list-item>
                            </text:list>
                          </text:list-item>
                          <text:list-item>
                            <text:p><text:span text:style-name="T2">Can analyze and predict</text:span></text:p>
                          </text:list-item>
                        </text:list>
                      </text:list-item>
                      <text:list-item>
                        <text:p><text:span text:style-name="T2">Example Attach Deep Learning to A set of binoculars – Can determine the type of bird.</text:span></text:p>
                      </text:list-item>
                      <text:list-item>
                        <text:p><text:span text:style-name="T2">Where are the sensor and can I attach a DL to it. <text:s/>-- Good way to create a start up.</text:span></text:p>
                      </text:list-item>
                    </text:list>
                  </text:list-item>
                  <text:list-item>
                    <text:p><text:span text:style-name="T2">Generative AI</text:span></text:p>
                    <text:list>
                      <text:list-item>
                        <text:p><text:span text:style-name="T2">Originally could not output unstructured data very well with Deep Learning</text:span></text:p>
                      </text:list-item>
                      <text:list-item>
                        <text:p><text:span text:style-name="T2">Getting more interesting ( can send text and an image and text and image <text:s/>) and get text and an image as output</text:span></text:p>
                        <text:list>
                          <text:list-item>
                            <text:p><text:span text:style-name="T2">Examples : Student submits both the picture to the right <text:s/>and the following questions: Its Wednesday at </text:span><text:span text:style-name="T2"><text:line-break/></text:span><text:span text:style-name="T2">4 pm. <text:s/>Can I park there right now ? Tell me in one line.</text:span></text:p>
                          </text:list-item>
                          <text:list-item>
                            <text:p><text:span text:style-name="T2">Answer from ChatGpt : Yes you can park for up to one hour starting at 4PM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5.715cm" svg:height="4.445cm" svg:x="22.225cm" svg:y="10.16cm">
          <draw:image xlink:href="Pictures/10000001000001350000018C4CEC6D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he circles inside “Gen AI” Circle are starting to merge. </text:span></text:p>
              </text:list-item>
              <text:list-item>
                <text:p><text:span text:style-name="T2">X and Y can be anything and it can be multimodel</text:span></text:p>
              </text:list-item>
              <text:list-item>
                <text:p><text:span text:style-name="T2">Can map from input to outputs as long as you have enough data</text:span></text:p>
                <text:list>
                  <text:list-item>
                    <text:p><text:span text:style-name="T2">X and Y can be text, string, audio or pictures</text:span></text:p>
                  </text:list-item>
                </text:list>
              </text:list-item>
              <text:list-item>
                <text:p><text:span text:style-name="T2">Neural Networks</text:span></text:p>
                <text:list>
                  <text:list-item>
                    <text:p><text:span text:style-name="T2">Logistic numbers : input vector of numbers output: probability</text:span></text:p>
                    <text:list>
                      <text:list-item>
                        <text:p><text:span text:style-name="T2">3</text:span><text:span text:style-name="T7">rd</text:span><text:span text:style-name="T2"> Image is the equ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Given two independent variables ( GPA, Experience ). <text:s/>Who will get called for an interview</text:span></text:p>
                  </text:list-item>
                  <text:list-item>
                    <text:p><text:span text:style-name="T2">Estimate the logistic regression and find the values for the coefficients ( See Next Page)</text:span></text:p>
                    <text:list>
                      <text:list-item>
                        <text:p><text:span text:style-name="T2">We can rewrite this formula as a network with input data flowing through two functions</text:span><text:span text:style-name="T2"><text:line-break/></text:span><text:span text:style-name="T2">which have been connected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8.255cm" svg:height="4.445cm" draw:transform="skewX (-0.0197222205475359) translate (18.256cm 3.32cm)">
          <draw:image xlink:href="Pictures/1000000100000252000001E4C6ED5C2A.png" xlink:type="simple" xlink:show="embed" xlink:actuate="onLoad" draw:mime-type="image/png">
            <text:p/>
          </draw:image>
        </draw:frame>
        <draw:frame draw:style-name="gr1" draw:text-style-name="P4" draw:layer="layout" svg:width="9.525cm" svg:height="2.724cm" svg:x="17.78cm" svg:y="8.071cm">
          <draw:image xlink:href="Pictures/1000000100000246000000AFBB2C418E.png" xlink:type="simple" xlink:show="embed" xlink:actuate="onLoad" draw:mime-type="image/png">
            <text:p/>
          </draw:image>
        </draw:frame>
        <draw:frame draw:style-name="gr1" draw:text-style-name="P4" draw:layer="layout" svg:width="9.947cm" svg:height="2.274cm" svg:x="17.78cm" svg:y="12.331cm">
          <draw:image xlink:href="Pictures/1000000100000310000000566A266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Introduction to Neural Networks and Deep </text:span><text:span text:style-name="T1">Learning; Training Deep NNs</text:span></text:p>
          </draw:text-box>
        </draw:frame>
        <draw:frame draw:style-name="gr3" draw:text-style-name="P4" draw:layer="layout" svg:width="22.706cm" svg:height="11.555cm" svg:x="2.999cm" svg:y="3.684cm" presentation:class="graphic" presentation:user-transformed="true">
          <draw:image xlink:href="Pictures/1000000100000542000002AD5971A0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network </text:span></text:p>
                <text:list>
                  <text:list-item>
                    <text:p><text:span text:style-name="T2">Output of this network is a probability </text:span></text:p>
                  </text:list-item>
                  <text:list-item>
                    <text:p><text:span text:style-name="T2">If there were many more variables the network would just add more</text:span><text:span text:style-name="T2"><text:line-break/></text:span><text:span text:style-name="T2">input nodes</text:span></text:p>
                  </text:list-item>
                  <text:list-item>
                    <text:p><text:span text:style-name="T2">Data flows from left to right</text:span></text:p>
                  </text:list-item>
                </text:list>
              </text:list-item>
              <text:list-item>
                <text:p><text:span text:style-name="T2">Terminology</text:span></text:p>
                <text:list>
                  <text:list-item>
                    <text:p><text:span text:style-name="T2">Coefficients ( .2, .5 ) are called weights</text:span></text:p>
                    <text:list>
                      <text:list-item>
                        <text:p><text:span text:style-name="T2">Know the coefficients and the weights then you can reconstruct the model</text:span></text:p>
                      </text:list-item>
                    </text:list>
                  </text:list-item>
                  <text:list-item>
                    <text:p><text:span text:style-name="T2">Intercept are called bias </text:span></text:p>
                  </text:list-item>
                </text:list>
              </text:list-item>
              <text:list-item>
                <text:p><text:span text:style-name="T2">Why did we write it as a network</text:span></text:p>
                <text:list>
                  <text:list-item>
                    <text:p><text:span text:style-name="T2">Wrote the equation this way to realize that there could be a lot of items in the middle</text:span></text:p>
                  </text:list-item>
                  <text:list-item>
                    <text:p><text:span text:style-name="T2">To learn representations transform the inputs one or more times before the prediction is completed</text:span></text:p>
                    <text:list>
                      <text:list-item>
                        <text:p><text:span text:style-name="T2">Simplest thing to do is run the data through a linear function</text:span></text:p>
                      </text:list-item>
                      <text:list-item>
                        <text:p><text:span text:style-name="T2">linear function shorthand – Circle with a “+”</text:span></text:p>
                      </text:list-item>
                      <text:list-item>
                        <text:p><text:span text:style-name="T2">Can have a stack as many linear functions as we wan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927cm" svg:height="4.564cm" svg:x="14.378cm" svg:y="3.81cm">
          <draw:image xlink:href="Pictures/1000000100000576000002AD715B26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We have transformed a K dimensional input into a 3 Dimensional Vector</text:span></text:p>
                    <text:list>
                      <text:list-item>
                        <text:p><text:span text:style-name="T2">Can flow the three dimensional vector through another function ( activation function )</text:span></text:p>
                        <text:list>
                          <text:list-item>
                            <text:p><text:span text:style-name="T2">An activation function is a nonlinear function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e can keep on doing layers of ( linear function and activation function )</text:span></text:p>
                    <text:list>
                      <text:list-item>
                        <text:p><text:span text:style-name="T2">Each layer has some capacity to learn something from the data </text:span></text:p>
                      </text:list-item>
                      <text:list-item>
                        <text:p><text:span text:style-name="T2">The more layers the more interesting things we can do with it.</text:span></text:p>
                      </text:list-item>
                    </text:list>
                  </text:list-item>
                  <text:list-item>
                    <text:p><text:span text:style-name="T2">Then we can pipe it to the Sigmund Function for outputs requiring a probability </text:span></text:p>
                  </text:list-item>
                  <text:list-item>
                    <text:p><text:span text:style-name="T2">This is a neural network with two layers</text:span></text:p>
                  </text:list-item>
                  <text:list-item>
                    <text:p><text:span text:style-name="T2">A neural network is nothing more than repeatably transformed inputs which are finally fed to a logistic regression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901cm" svg:height="4.445cm" svg:x="3.229cm" svg:y="10.795cm">
          <draw:image xlink:href="Pictures/10000001000002FE0000013BB1767E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><text:span text:style-name="T2">Explainability </text:span></text:p>
                <text:list>
                  <text:list-item>
                    <text:p><text:span text:style-name="T2">Example – A neural network to determine if a person will repay a lone</text:span></text:p>
                    <text:list>
                      <text:list-item>
                        <text:p><text:span text:style-name="T2">Can not relate it back to a specific attribute since they are all meshed togeth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n example of an neuron is the first image on the right </text:span></text:p>
                <text:list>
                  <text:list-item>
                    <text:p><text:span text:style-name="T2">Linear function and a nonlinear function </text:span></text:p>
                  </text:list-item>
                  <text:list-item>
                    <text:p><text:span text:style-name="T2">A node is a neuron with one output.</text:span></text:p>
                  </text:list-item>
                </text:list>
              </text:list-item>
              <text:list-item>
                <text:p><text:span text:style-name="T2">An example of a layer is the second picture on the right </text:span></text:p>
              </text:list-item>
              <text:list-item>
                <text:p><text:span text:style-name="T2">Non Linear Functions ( circle with the f(x) ) are activation functions</text:span></text:p>
              </text:list-item>
              <text:list-item>
                <text:p><text:span text:style-name="T2">Input Layer is in quotes since it is the only layer not doing anything ( see picture below )</text:span></text:p>
              </text:list-item>
              <text:list-item>
                <text:p><text:span text:style-name="T2">Dense or Fully Connected -- When every neuron in a layer ( n – 1 ) is connected to every neuron in </text:span><text:span text:style-name="T2"><text:line-break/></text:span><text:span text:style-name="T2">layer (n) </text:span></text:p>
              </text:list-item>
              <text:list-item>
                <text:p><text:span text:style-name="T2">Deep Learning is Neural Networks with a lot of layers of layers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8.519cm" svg:height="3.968cm" svg:x="18.415cm" svg:y="4.287cm">
          <draw:image xlink:href="Pictures/100000010000014200000096E7CCAB7D.png" xlink:type="simple" xlink:show="embed" xlink:actuate="onLoad" draw:mime-type="image/png">
            <text:p/>
          </draw:image>
        </draw:frame>
        <draw:frame draw:style-name="gr1" draw:text-style-name="P4" draw:layer="layout" svg:width="7.322cm" svg:height="7.494cm" svg:x="18.713cm" svg:y="8.255cm">
          <draw:image xlink:href="Pictures/100000010000014C000002CA202DFF6A.png" xlink:type="simple" xlink:show="embed" xlink:actuate="onLoad" draw:mime-type="image/png">
            <text:p/>
          </draw:image>
        </draw:frame>
        <draw:frame draw:style-name="gr1" draw:text-style-name="P4" draw:layer="layout" svg:width="8.928cm" svg:height="2.119cm" svg:x="3.772cm" svg:y="13.121cm">
          <draw:image xlink:href="Pictures/100000010000059D0000030A613E3A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Logistic regression – A simple neural network with no hidden layers</text:span></text:p>
              </text:list-item>
              <text:list-item>
                <text:p><text:span text:style-name="T2">Activation Functions</text:span></text:p>
                <text:list>
                  <text:list-item>
                    <text:p><text:span text:style-name="T2">Receives a single number and outputs a single number</text:span></text:p>
                  </text:list-item>
                  <text:list-item>
                    <text:p><text:span text:style-name="T2">Common Activation Function </text:span></text:p>
                    <text:list>
                      <text:list-item>
                        <text:p><text:span text:style-name="T2">sigmoid <text:s/>-- For very large it will get activated</text:span></text:p>
                      </text:list-item>
                      <text:list-item>
                        <text:p><text:span text:style-name="T2">Linear Activation Function – provide a number get the same number </text:span><text:span text:style-name="T2"><text:line-break/></text:span><text:span text:style-name="T2">back</text:span></text:p>
                      </text:list-item>
                      <text:list-item>
                        <text:p><text:span text:style-name="T2">Relu – If number is negative then 0 else 1 ( activation )</text:span></text:p>
                      </text:list-item>
                    </text:list>
                  </text:list-item>
                  <text:list-item>
                    <text:p><text:span text:style-name="T2">When starting out stick to RELu which can get almost anything d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08cm" svg:height="6.35cm" svg:x="21.59cm" svg:y="3.81cm">
          <draw:image xlink:href="Pictures/1000000100000436000002AB33A17D09.png" xlink:type="simple" xlink:show="embed" xlink:actuate="onLoad" draw:mime-type="image/png">
            <text:p/>
          </draw:image>
        </draw:frame>
        <draw:frame draw:style-name="gr1" draw:text-style-name="P4" draw:layer="layout" svg:width="5.08cm" svg:height="6.204cm" svg:x="15.875cm" svg:y="3.956cm">
          <draw:image xlink:href="Pictures/10000001000003B30000027D29FEB6F5.png" xlink:type="simple" xlink:show="embed" xlink:actuate="onLoad" draw:mime-type="image/png">
            <text:p/>
          </draw:image>
        </draw:frame>
        <draw:frame draw:style-name="gr1" draw:text-style-name="P4" draw:layer="layout" svg:width="3.453cm" svg:height="4.954cm" svg:x="22.86cm" svg:y="10.795cm">
          <draw:image xlink:href="Pictures/10000001000003B3000002CB558575AA.png" xlink:type="simple" xlink:show="embed" xlink:actuate="onLoad" draw:mime-type="image/png">
            <text:p/>
          </draw:image>
        </draw:frame>
        <draw:frame draw:style-name="gr1" draw:text-style-name="P4" draw:layer="layout" svg:width="14.605cm" svg:height="5.08cm" svg:x="1.905cm" svg:y="9.96cm">
          <draw:image xlink:href="Pictures/1000000100000526000002CB20AB4E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Designing a Deep Learning Network</text:span></text:p>
                <text:list>
                  <text:list-item>
                    <text:p><text:span text:style-name="T2">The developer can choose</text:span></text:p>
                    <text:list>
                      <text:list-item>
                        <text:p><text:span text:style-name="T2">Number of hidden layers</text:span></text:p>
                      </text:list-item>
                      <text:list-item>
                        <text:p><text:span text:style-name="T2">Number of Neurons in each layer</text:span></text:p>
                      </text:list-item>
                      <text:list-item>
                        <text:p><text:span text:style-name="T2">Activation functions for each layer and for the output layers</text:span></text:p>
                        <text:list>
                          <text:list-item>
                            <text:p><text:span text:style-name="T2">For the output layer must choose the activation function that will produce your type of output ( ex. sigmoid for probability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DropOut – In a layer drop some of the neurons randomly to prevent overfitting </text:span></text:p>
              </text:list-item>
              <text:list-item>
                <text:p><text:span text:style-name="T2"><text:s/>How many parameters does a this neural network have</text:span></text:p>
                <text:list>
                  <text:list-item>
                    <text:p><text:span text:style-name="T2">The red are the inputs</text:span></text:p>
                  </text:list-item>
                  <text:list-item>
                    <text:p><text:span text:style-name="T2">People forget the bias which are the green ones <text:s/>for both the hidden and output layers</text:span></text:p>
                  </text:list-item>
                </text:list>
              </text:list-item>
              <text:list-item>
                <text:p><text:span text:style-name="T2">Research Neural Architecture Search</text:span></text:p>
              </text:list-item>
            </text:list>
          </draw:text-box>
        </draw:frame>
        <draw:frame draw:style-name="gr1" draw:text-style-name="P4" draw:layer="layout" svg:width="9.563cm" svg:height="6.985cm" svg:x="17.145cm" svg:y="8.255cm">
          <draw:image xlink:href="Pictures/1000000100000526000002CB7ED54B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Introduction to Neural Networks and Deep Learning; Training Deep NNs</text:span></text:p>
          </draw:text-box>
        </draw:frame>
        <draw:frame presentation:style-name="pr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This Is a feedforward network</text:span></text:p>
              </text:list-item>
              <text:list-item>
                <text:p text:style-name="P8"><text:span text:style-name="T2">Network’s Architecture </text:span></text:p>
                <text:list>
                  <text:list-item>
                    <text:p><text:span text:style-name="T2">Activation Functions</text:span></text:p>
                  </text:list-item>
                  <text:list-item>
                    <text:p><text:span text:style-name="T2">Connections between layers </text:span></text:p>
                  </text:list-item>
                  <text:list-item>
                    <text:p><text:span text:style-name="T2">arrangement of neurons into layers</text:span></text:p>
                  </text:list-item>
                </text:list>
              </text:list-item>
              <text:list-item>
                <text:p><text:span text:style-name="T2">Transformers have proven to be much more capable than recurrent neural networks</text:span></text:p>
              </text:list-item>
              <text:list-item>
                <text:p><text:span text:style-name="T2">Last page</text:span></text:p>
              </text:list-item>
            </text:list>
          </draw:text-box>
        </draw:frame>
        <draw:frame draw:style-name="gr1" draw:text-style-name="P4" draw:layer="layout" svg:width="10.198cm" svg:height="4.039cm" svg:x="16.51cm" svg:y="3.81cm">
          <draw:image xlink:href="Pictures/1000000100000526000002CBE0A10001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4.061cm" svg:x="16.51cm" svg:y="8.639cm">
          <draw:image xlink:href="Pictures/1000000100000526000002CB24E3E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aults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se Relu for activation functions</text:p>
              </text:list-item>
              <text:list-item>
                <text:p>Use Adam for regulariza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02:02:59.101967000</meta:creation-date>
    <dc:date>2026-05-20T23:26:51.490447000</dc:date>
    <meta:editing-duration>P10DT11H1M8S</meta:editing-duration>
    <meta:editing-cycles>22</meta:editing-cycles>
    <meta:generator>LibreOffice/26.2.3.2$MacOSX_AARCH64 LibreOffice_project/70e089b17412e4cb7773e41413306b17a2328c34</meta:generator>
    <meta:document-statistic meta:object-count="86"/>
  </office:meta>
</office:document-meta>
</file>