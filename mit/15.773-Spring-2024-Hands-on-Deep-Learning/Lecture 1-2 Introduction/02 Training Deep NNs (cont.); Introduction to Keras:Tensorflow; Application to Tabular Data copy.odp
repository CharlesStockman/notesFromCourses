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9000002194E038B3E.png" manifest:media-type="image/png"/>
  <manifest:file-entry manifest:full-path="Pictures/10000001000001E30000004E0AD68435.png" manifest:media-type="image/png"/>
  <manifest:file-entry manifest:full-path="Pictures/10000001000002350000004A6C7CD89B.png" manifest:media-type="image/png"/>
  <manifest:file-entry manifest:full-path="Pictures/10000001000004E6000001BF0735DA9D.png" manifest:media-type="image/png"/>
  <manifest:file-entry manifest:full-path="Pictures/100000010000050400000097666DFD48.png" manifest:media-type="image/png"/>
  <manifest:file-entry manifest:full-path="Pictures/1000000100000270000000B9D85AFE72.png" manifest:media-type="image/png"/>
  <manifest:file-entry manifest:full-path="Pictures/1000000100000536000000E986562CCB.png" manifest:media-type="image/png"/>
  <manifest:file-entry manifest:full-path="Pictures/10000001000004B70000015FC2346448.png" manifest:media-type="image/png"/>
  <manifest:file-entry manifest:full-path="Pictures/100000010000029900000097B8057C94.png" manifest:media-type="image/png"/>
  <manifest:file-entry manifest:full-path="Pictures/1000000100000228000000525FB22D7D.png" manifest:media-type="image/png"/>
  <manifest:file-entry manifest:full-path="Pictures/100000010000023D00000173D41FF2F8.png" manifest:media-type="image/png"/>
  <manifest:file-entry manifest:full-path="Pictures/100000010000033F000002320D56708F.png" manifest:media-type="image/png"/>
  <manifest:file-entry manifest:full-path="Pictures/100000010000055B000000478FD7CE0D.png" manifest:media-type="image/png"/>
  <manifest:file-entry manifest:full-path="Pictures/100000010000054B00000227DDF1E0A7.png" manifest:media-type="image/png"/>
  <manifest:file-entry manifest:full-path="Pictures/10000001000005360000015ADAF0F5BB.png" manifest:media-type="image/png"/>
  <manifest:file-entry manifest:full-path="Pictures/10000001000002CE0000014EAFE448AD.png" manifest:media-type="image/png"/>
  <manifest:file-entry manifest:full-path="Pictures/100000010000030500000221A39DDFB5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justify" draw:textarea-vertical-align="top" fo:padding-top="0cm" fo:padding-bottom="0cm" fo:padding-left="0cm" fo:padding-right="0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32pt"/>
    </style:style>
    <style:style style:name="P3" style:family="paragraph">
      <style:text-properties fo:font-size="1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4cm" fo:margin-bottom="0cm"/>
    </style:style>
    <style:style style:name="T1" style:family="text">
      <style:text-properties fo:font-size="32pt" fo:font-weight="bold" style:font-size-asian="16pt" style:font-weight-asian="bold" style:font-size-complex="16pt" style:font-weight-complex="bold"/>
    </style:style>
    <style:style style:name="T2" style:family="text">
      <style:text-properties fo:font-size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b 58%" fo:font-size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 Training Deep NNs (cont.); Introduction to Keras/Tensorflow; Application to Tabular Data</text:span></text:p>
          </draw:text-box>
        </draw:frame>
        <draw:frame presentation:style-name="pr2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When do you use a machine learning algorithm vs neural nets</text:span></text:p>
                <text:list>
                  <text:list-item>
                    <text:p><text:span text:style-name="T2">How important is it that you need to explain or interpret what is going on inside the model to a non technical </text:span></text:p>
                    <text:list>
                      <text:list-item>
                        <text:p><text:span text:style-name="T2">Use ML</text:span></text:p>
                      </text:list-item>
                    </text:list>
                  </text:list-item>
                  <text:list-item>
                    <text:p><text:span text:style-name="T2">How important is predictive accuracy </text:span></text:p>
                    <text:list>
                      <text:list-item>
                        <text:p><text:span text:style-name="T2">Use Neural Network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echanistic interoperability – Tries to understand what is going on in the big black boxes ( neural networks )</text:span></text:p>
              </text:list-item>
              <text:list-item>
                <text:p><text:span text:style-name="T2">Design the network </text:span></text:p>
                <text:list>
                  <text:list-item>
                    <text:p><text:span text:style-name="T2">Number of Hidden Layers</text:span><text:span text:style-name="T2"><text:tab/></text:span><text:span text:style-name="T2"><text:tab/></text:span><text:span text:style-name="T2">1 hidden layer</text:span></text:p>
                  </text:list-item>
                  <text:list-item>
                    <text:p><text:span text:style-name="T2">Number of neurons in each layer</text:span><text:span text:style-name="T2"><text:tab/></text:span><text:span text:style-name="T2"><text:tab/></text:span><text:span text:style-name="T2">16</text:span></text:p>
                  </text:list-item>
                  <text:list-item>
                    <text:p><text:span text:style-name="T2">Pick right output layer</text:span><text:span text:style-name="T2"><text:tab/></text:span><text:span text:style-name="T2"><text:tab/></text:span><text:span text:style-name="T2"><text:tab/></text:span><text:span text:style-name="T2">sigmoid <text:s/>( produces a probability used for classification problems )</text:span></text:p>
                  </text:list-item>
                  <text:list-item>
                    <text:p><text:span text:style-name="T2">Some data must be hot encoded </text:span></text:p>
                    <text:list>
                      <text:list-item>
                        <text:p><text:span text:style-name="T2">There are only 13 input variables, but we are using hot encoding so the number of inputs has increased to 16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specially for structured data all output of the previous are inputs to each neuron in the next columns</text:span></text:p>
                <text:list>
                  <text:list-item>
                    <text:p><text:span text:style-name="T2">An exception is Image Processin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1"> Training Deep NNs (cont.); Introduction to </text:span><text:span text:style-name="T1">Keras/Tensorflow; Application to Tabular Data</text:span></text:p>
          </draw:text-box>
        </draw:frame>
        <draw:frame presentation:style-name="pr2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How many weights are there</text:span></text:p>
                <text:list>
                  <text:list-item>
                    <text:p><text:span text:style-name="T2">Hidden Layer ( 29 * 16 ) + 16 ( There are 16 Biases )</text:span></text:p>
                  </text:list-item>
                  <text:list-item>
                    <text:p><text:span text:style-name="T2">Output Layer 16 * 1 + 1 ( bias) </text:span></text:p>
                  </text:list-item>
                </text:list>
              </text:list-item>
              <text:list-item>
                <text:p><text:span text:style-name="T2">Translate this code in Keras Code </text:span></text:p>
                <text:list>
                  <text:list-item>
                    <text:p><text:span text:style-name="T2">// Define the layers</text:span></text:p>
                  </text:list-item>
                  <text:list-item>
                    <text:p><text:span text:style-name="T2">input = keras.Input(shape=29)</text:span></text:p>
                  </text:list-item>
                  <text:list-item>
                    <text:p><text:span text:style-name="T2">h = keras.layers.dense(16, activiation=”relu”)(input)</text:span><text:span text:style-name="T2"><text:tab/></text:span><text:span text:style-name="T2"><text:tab/></text:span><text:span text:style-name="T2">// parameters for dense: # of nodes, activation and the input to h is the input</text:span></text:p>
                  </text:list-item>
                  <text:list-item>
                    <text:p><text:span text:style-name="T2">keras.layers.dense(1, activation=”sigmoid”)(h)</text:span></text:p>
                  </text:list-item>
                  <text:list-item>
                    <text:p><text:span text:style-name="T2">model = Keras.Model(input, output) </text:span></text:p>
                  </text:list-item>
                </text:list>
              </text:list-item>
              <text:list-item>
                <text:p><text:span text:style-name="T2">Training </text:span></text:p>
                <text:list>
                  <text:list-item>
                    <text:p><text:span text:style-name="T2">Find the values of the coefficients so the model’s predictions come as close to the actual values as possible</text:span></text:p>
                  </text:list-item>
                  <text:list-item>
                    <text:p><text:span text:style-name="T2">Linear and Logistic Regression is done under the hood while neural networks are not under the hood</text:span></text:p>
                  </text:list-item>
                  <text:list-item>
                    <text:p><text:span text:style-name="T2">The essence of training is to find the best values for weights and biases </text:span></text:p>
                    <text:list>
                      <text:list-item>
                        <text:p><text:span text:style-name="T2">Minimize <text:s/>a function that minimizes the discrepancy ( researchers get very creative with this ) <text:s/>between the actual and predicted.</text:span></text:p>
                      </text:list-item>
                      <text:list-item>
                        <text:p><text:span text:style-name="T2">Called loss fun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1"> Training Deep NNs (cont.); Introduction to Keras/Tensorflow; Application to Tabular Data</text:span></text:p>
          </draw:text-box>
        </draw:frame>
        <draw:frame presentation:style-name="pr2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A loss function that quantifies the error in a model’s prediction.</text:span></text:p>
                    <text:list>
                      <text:list-item>
                        <text:p><text:span text:style-name="T2">If the prediction are close to an actual value the loss would be small</text:span></text:p>
                      </text:list-item>
                      <text:list-item>
                        <text:p><text:span text:style-name="T2">A perfect model would have a loss of zero</text:span></text:p>
                      </text:list-item>
                    </text:list>
                  </text:list-item>
                  <text:list-item>
                    <text:p><text:span text:style-name="T2">In linear regression the sum of squares is used.</text:span></text:p>
                  </text:list-item>
                  <text:list-item>
                    <text:p><text:span text:style-name="T2">The loss function that we choose must be matched well with the kind of output that comes out of the model</text:span></text:p>
                  </text:list-item>
                  <text:list-item>
                    <text:p><text:span text:style-name="T2">What is a good loss function</text:span></text:p>
                    <text:list>
                      <text:list-item>
                        <text:list>
                          <text:list-item>
                            <text:p><text:span text:style-name="T2">High Values of probability should have low losses</text:span></text:p>
                          </text:list-item>
                          <text:list-item>
                            <text:p><text:span text:style-name="T2">Low Value of probability should have high losses</text:span></text:p>
                          </text:list-item>
                          <text:list-item>
                            <text:p><text:span text:style-name="T2">loss = -log(predicted probability) </text:span></text:p>
                            <text:list>
                              <text:list-item>
                                <text:p><text:span text:style-name="T2">For data point where y = 1 we want to use the chart below (right)</text:span></text:p>
                              </text:list-item>
                            </text:list>
                          </text:list-item>
                          <text:list-item>
                            <text:p><text:span text:style-name="T2">loss = -log(1 – probability ) </text:span></text:p>
                            <text:list>
                              <text:list-item>
                                <text:p><text:span text:style-name="T2">For data point where y = 0 we want to use the chart (left)</text:span></text:p>
                              </text:list-item>
                            </text:list>
                          </text:list-item>
                          <text:list-item>
                            <text:p><text:span text:style-name="T2">Combine them both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5.154cm" svg:height="6.829cm" svg:x="22.151cm" svg:y="3.81cm">
          <draw:image xlink:href="Pictures/100000010000030500000221A39DDFB5.png" xlink:type="simple" xlink:show="embed" xlink:actuate="onLoad" draw:mime-type="image/png">
            <text:p/>
          </draw:image>
        </draw:frame>
        <draw:frame draw:style-name="gr2" draw:text-style-name="P6" draw:layer="layout" svg:width="5.635cm" svg:height="4.735cm" svg:x="21.67cm" svg:y="10.795cm">
          <draw:image xlink:href="Pictures/100000010000023D00000173D41FF2F8.png" xlink:type="simple" xlink:show="embed" xlink:actuate="onLoad" draw:mime-type="image/png">
            <text:p/>
          </draw:image>
        </draw:frame>
        <draw:frame draw:style-name="gr2" draw:text-style-name="P6" draw:layer="layout" svg:width="5.08cm" svg:height="4.445cm" svg:x="16.51cm" svg:y="10.795cm">
          <draw:image xlink:href="Pictures/10000001000002CE0000014EAFE448AD.png" xlink:type="simple" xlink:show="embed" xlink:actuate="onLoad" draw:mime-type="image/png">
            <text:p/>
          </draw:image>
        </draw:frame>
        <draw:frame draw:style-name="gr2" draw:text-style-name="P6" draw:layer="layout" svg:width="15.875cm" svg:height="4.042cm" svg:x="0cm" svg:y="11.43cm">
          <draw:image xlink:href="Pictures/100000010000054B00000227DDF1E0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1"> Training Deep NNs (cont.); Introduction to Keras/Tensorflow; Application to Tabular Data</text:span></text:p>
          </draw:text-box>
        </draw:frame>
        <draw:frame presentation:style-name="pr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dd all the values of database point and average them </text:span></text:p>
              </text:list-item>
              <text:list-item>
                <text:p><text:span text:style-name="T2">Binary Cross Empathy Loss Function</text:span></text:p>
              </text:list-item>
              <text:list-item>
                <text:p><text:span text:style-name="T2">Google : Pinball loss</text:span></text:p>
              </text:list-item>
              <text:list-item>
                <text:p><text:span text:style-name="T2"/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7cm" svg:height="3.696cm" svg:x="13.97cm" svg:y="3.924cm">
          <draw:image xlink:href="Pictures/10000001000004B70000015FC23464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1"> Training Deep NNs (cont.); Introduction to Keras/Tensorflow; Application to Tabular Data</text:span></text:p>
          </draw:text-box>
        </draw:frame>
        <draw:frame presentation:style-name="pr2" draw:layer="layout" svg:width="25.905cm" svg:height="12.065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Minimize the function to the right</text:span></text:p>
                <text:list>
                  <text:list-item>
                    <text:p><text:span text:style-name="T2">A derivative informs about the rate of change</text:span></text:p>
                    <text:list>
                      <text:list-item>
                        <text:p><text:span text:style-name="T2">The change in g(w) for <text:s/>a small change in s</text:span></text:p>
                      </text:list-item>
                      <text:list-item>
                        <text:p><text:span text:style-name="T2">If derivative at point w is positive increasing w will slightly increase g(w)</text:span></text:p>
                      </text:list-item>
                      <text:list-item>
                        <text:p><text:span text:style-name="T2">if derivative at point w is negative decreasing w will slightly decrease g(w)</text:span></text:p>
                      </text:list-item>
                      <text:list-item>
                        <text:p><text:span text:style-name="T2">If close to 0 then changing w slightly will not change anything.</text:span></text:p>
                      </text:list-item>
                    </text:list>
                  </text:list-item>
                  <text:list-item>
                    <text:p><text:span text:style-name="T2">Suggest an algorithm for minimizing g(w)</text:span></text:p>
                    <text:list>
                      <text:list-item>
                        <text:p><text:span text:style-name="T2">Start with some point w </text:span></text:p>
                      </text:list-item>
                      <text:list-item>
                        <text:p><text:span text:style-name="T2">Calculate the derivative (I.e slope ) of g(w) at w</text:span></text:p>
                        <text:list>
                          <text:list-item>
                            <text:p><text:span text:style-name="T3">Positive: </text:span><text:span text:style-name="T2">If derivative at point w is positive increasing </text:span><text:span text:style-name="T2"><text:line-break/></text:span><text:span text:style-name="T2">w will slightly increase g(w)</text:span></text:p>
                          </text:list-item>
                          <text:list-item>
                            <text:p><text:span text:style-name="T2">Negative: if derivative at point w is negative decreasing</text:span><text:span text:style-name="T2"><text:line-break/></text:span><text:span text:style-name="T2"> w will slightly decrease g(w)</text:span></text:p>
                          </text:list-item>
                          <text:list-item>
                            <text:p><text:span text:style-name="T2">If close to 0 then changing w slightly will not change anything.</text:span></text:p>
                          </text:list-item>
                        </text:list>
                      </text:list-item>
                      <text:list-item>
                        <text:p><text:span text:style-name="T2">Algorithm – To the right is the gradient descent</text:span></text:p>
                        <text:list>
                          <text:list-item>
                            <text:p><text:span text:style-name="T2">alpha ( learning rate) – forces use to decrease or increase w only</text:span><text:span text:style-name="T2"><text:line-break/></text:span><text:span text:style-name="T2">slightly</text:span></text:p>
                            <text:list>
                              <text:list-item>
                                <text:p><text:span text:style-name="T2">Part of the IP for how the system is built</text:span></text:p>
                              </text:list-item>
                              <text:list-item>
                                <text:p><text:span text:style-name="T2">If the learning rate seem to be going in a downward direction</text:span><text:span text:style-name="T2"><text:line-break/></text:span><text:span text:style-name="T2">and there is a belief it will go down farther then the learning </text:span><text:span text:style-name="T2"><text:line-break/></text:span><text:span text:style-name="T2">should be bigg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0.219cm" svg:height="4.57cm" svg:x="15.875cm" svg:y="3.257cm">
          <draw:image xlink:href="Pictures/10000001000005360000015ADAF0F5BB.png" xlink:type="simple" xlink:show="embed" xlink:actuate="onLoad" draw:mime-type="image/png">
            <text:p/>
          </draw:image>
        </draw:frame>
        <draw:frame draw:style-name="gr2" draw:text-style-name="P6" draw:layer="layout" svg:width="10.854cm" svg:height="3.619cm" svg:x="16.451cm" svg:y="7.811cm">
          <draw:image xlink:href="Pictures/1000000100000536000000E986562CCB.png" xlink:type="simple" xlink:show="embed" xlink:actuate="onLoad" draw:mime-type="image/png">
            <text:p/>
          </draw:image>
        </draw:frame>
        <draw:frame draw:style-name="gr2" draw:text-style-name="P6" draw:layer="layout" svg:width="9.525cm" svg:height="3.05cm" svg:x="17.145cm" svg:y="12.19cm">
          <draw:image xlink:href="Pictures/1000000100000270000000B9D85AFE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1"> Training Deep NNs (cont.); Introduction to Keras/Tensorflow; Application to Tabular Data</text:span></text:p>
          </draw:text-box>
        </draw:frame>
        <draw:frame presentation:style-name="pr2" draw:text-style-name="P3" draw:layer="layout" svg:width="25.905cm" svg:height="11.555cm" svg:x="1.4cm" svg:y="3.81cm" presentation:class="outline" presentation:user-transformed="true">
          <draw:text-box>
            <text:list text:style-name="L2">
              <text:list-item>
                <text:p><text:span text:style-name="T2">For each variable pretend everything else is constant</text:span></text:p>
                <text:list>
                  <text:list-item>
                    <text:p><text:span text:style-name="T2">The first number is the change in g(w) for a small increase</text:span><text:span text:style-name="T2"><text:line-break/></text:span><text:span text:style-name="T2">in w</text:span><text:span text:style-name="T4">1</text:span><text:span text:style-name="T2"> while w</text:span><text:span text:style-name="T4">2</text:span><text:span text:style-name="T2"> is kept unchanged</text:span></text:p>
                  </text:list-item>
                  <text:list-item>
                    <text:p text:style-name="P8"><text:span text:style-name="T5">The second number is the change in g(w) for a small</text:span><text:span text:style-name="T5"><text:line-break/></text:span><text:span text:style-name="T5">increase </text:span><text:span text:style-name="T2">in w</text:span><text:span text:style-name="T4">2</text:span><text:span text:style-name="T2"> while w</text:span><text:span text:style-name="T4">1</text:span><text:span text:style-name="T2"> is kept unchanged</text:span></text:p>
                  </text:list-item>
                  <text:list-item>
                    <text:p text:style-name="P8"><text:span text:style-name="T2">All the gradients <text:s/>of a system kept in an array (gradients)</text:span></text:p>
                    <text:list>
                      <text:list-item>
                        <text:p><text:span text:style-name="T2">Do gradient descent on each coordinate by using the corresponding</text:span><text:span text:style-name="T2"><text:line-break/></text:span><text:span text:style-name="T2">derivative </text:span></text:p>
                      </text:list-item>
                    </text:list>
                  </text:list-item>
                  <text:list-item>
                    <text:p text:style-name="P8"><text:span text:style-name="T2">Upside Triangle is called a nabla</text:span></text:p>
                  </text:list-item>
                </text:list>
              </text:list-item>
              <text:list-item>
                <text:p><text:span text:style-name="T2">Gradient Descent may stop near a local minimum ( not necessary a global </text:span><text:span text:style-name="T2"><text:line-break/></text:span><text:span text:style-name="T2">minimum ) or a saddle point, but we don’t worry about this in practice</text:span></text:p>
                <text:list>
                  <text:list-item>
                    <text:p><text:span text:style-name="T2">Even finding a descent solution to the problem to these complicated networks</text:span><text:span text:style-name="T2"><text:line-break/></text:span><text:span text:style-name="T2">are good</text:span></text:p>
                  </text:list-item>
                  <text:list-item>
                    <text:p><text:span text:style-name="T2">With the best possible solution there is a risk of overfitting</text:span></text:p>
                  </text:list-item>
                  <text:list-item>
                    <text:p><text:span text:style-name="T2">Usually in neural networks with many dimensions the best that can be achieved</text:span><text:span text:style-name="T2"><text:line-break/></text:span><text:span text:style-name="T2">is a saddle point ( both a minimum <text:s/>in one direction and a maximum in the other</text:span><text:span text:style-name="T2"><text:line-break/></text:span><text:span text:style-name="T2">direction. </text:span></text:p>
                  </text:list-item>
                </text:list>
              </text:list-item>
              <text:list-item>
                <text:p><text:span text:style-name="T2">g(w) is the loss function </text:span></text:p>
              </text:list-item>
            </text:list>
          </draw:text-box>
        </draw:frame>
        <draw:frame draw:style-name="gr2" draw:text-style-name="P6" draw:layer="layout" svg:width="15.875cm" svg:height="3.3cm" svg:x="12.065cm" svg:y="3.685cm">
          <draw:image xlink:href="Pictures/10000001000004E6000001BF0735DA9D.png" xlink:type="simple" xlink:show="embed" xlink:actuate="onLoad" draw:mime-type="image/png">
            <text:p/>
          </draw:image>
        </draw:frame>
        <draw:frame draw:style-name="gr2" draw:text-style-name="P6" draw:layer="layout" svg:width="11.43cm" svg:height="3.994cm" svg:x="15.875cm" svg:y="7.62cm">
          <draw:image xlink:href="Pictures/100000010000029900000097B8057C94.png" xlink:type="simple" xlink:show="embed" xlink:actuate="onLoad" draw:mime-type="image/png">
            <text:p/>
          </draw:image>
        </draw:frame>
        <draw:frame draw:style-name="gr3" draw:text-style-name="P6" draw:layer="layout" svg:width="12.065cm" svg:height="2.021cm" svg:x="15.875cm" svg:y="12.065cm">
          <draw:image xlink:href="Pictures/100000010000050400000097666DFD48.png" xlink:type="simple" xlink:show="embed" xlink:actuate="onLoad" draw:mime-type="image/png">
            <text:p/>
          </draw:image>
        </draw:frame>
        <draw:frame draw:style-name="gr2" draw:text-style-name="P6" draw:layer="layout" svg:width="9.233cm" svg:height="1.957cm" svg:x="16.51cm" svg:y="13.918cm">
          <draw:image xlink:href="Pictures/10000001000002350000004A6C7CD8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1"> Training Deep NNs (cont.); Introduction to </text:span><text:span text:style-name="T1">Keras/Tensorflow; Application to Tabular Data</text:span></text:p>
          </draw:text-box>
        </draw:frame>
        <draw:frame presentation:style-name="pr2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Minimizing a loss function of gradient descent</text:span></text:p>
                <text:list>
                  <text:list-item>
                    <text:p><text:span text:style-name="T2">What are the variables we need to change to minimize this function </text:span></text:p>
                    <text:list>
                      <text:list-item>
                        <text:p><text:span text:style-name="T2">The weights</text:span></text:p>
                      </text:list-item>
                      <text:list-item>
                        <text:p><text:span text:style-name="T2">When model(x</text:span><text:span text:style-name="T6">i</text:span><text:span text:style-name="T2">) is substituted then it become a function</text:span><text:span text:style-name="T2"><text:line-break/></text:span><text:span text:style-name="T2">of the weights</text:span></text:p>
                      </text:list-item>
                    </text:list>
                  </text:list-item>
                  <text:list-item>
                    <text:p><text:span text:style-name="T2">The array of x values is just the data</text:span></text:p>
                  </text:list-item>
                  <text:list-item>
                    <text:p><text:span text:style-name="T2">Back Propagation</text:span></text:p>
                    <text:list>
                      <text:list-item>
                        <text:p><text:span text:style-name="T2">Efficient way to compute the gradient loss of a function</text:span></text:p>
                        <text:list>
                          <text:list-item>
                            <text:p><text:span text:style-name="T2">Efficiency stems from exploiting layer by layer architecture of Neural Networks</text:span></text:p>
                          </text:list-item>
                        </text:list>
                      </text:list-item>
                      <text:list-item>
                        <text:p><text:span text:style-name="T2">By organizing the computation in the form of a computational graph the gradient can be calculated one layer at a time using matrix multiplications ( and other simple activations )</text:span></text:p>
                        <text:list>
                          <text:list-item>
                            <text:p><text:span text:style-name="T2">this approach limits redundant calculations </text:span></text:p>
                          </text:list-item>
                        </text:list>
                      </text:list-item>
                      <text:list-item>
                        <text:p><text:span text:style-name="T2">Idea </text:span></text:p>
                        <text:list>
                          <text:list-item>
                            <text:p><text:span text:style-name="T2">Start with the end and calculate the gradient of the loss with respect to the output, </text:span></text:p>
                          </text:list-item>
                          <text:list-item>
                            <text:p><text:span text:style-name="T2">calculate the gradient of that output with respect to the output of prior hidden layer </text:span></text:p>
                          </text:list-item>
                          <text:list-item>
                            <text:p><text:span text:style-name="T2">calculate the gradient of the current with respect to the previous layer0</text:span></text:p>
                          </text:list-item>
                        </text:list>
                      </text:list-item>
                      <text:list-item>
                        <text:p><text:span text:style-name="T2">It is iterative </text:span></text:p>
                      </text:list-item>
                      <text:list-item>
                        <text:p><text:span text:style-name="T2">Move backwards and never repeat the same calculation <text:s/>twice</text:span></text:p>
                      </text:list-item>
                      <text:list-item>
                        <text:p><text:span text:style-name="T2"><text:s/>Advantage </text:span></text:p>
                        <text:list>
                          <text:list-item>
                            <text:p><text:span text:style-name="T2">Calculate once and use many times </text:span></text:p>
                          </text:list-item>
                          <text:list-item>
                            <text:p><text:span text:style-name="T2">Becomes a sequence of matrix multiplications </text:span></text:p>
                          </text:list-item>
                        </text:list>
                      </text:list-item>
                      <text:list-item>
                        <text:p><text:span text:style-name="T2">GPU(s) are very well suited for this </text:span></text:p>
                        <text:list>
                          <text:list-item>
                            <text:p><text:span text:style-name="T2">BackProp + GPU = Fast calculation of loss function gradient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778cm" svg:height="2.063cm" svg:x="14.605cm" svg:y="3.652cm">
          <draw:image xlink:href="Pictures/10000001000001E30000004E0AD68435.png" xlink:type="simple" xlink:show="embed" xlink:actuate="onLoad" draw:mime-type="image/png">
            <text:p/>
          </draw:image>
        </draw:frame>
        <draw:frame draw:style-name="gr2" draw:text-style-name="P6" draw:layer="layout" svg:width="13.395cm" svg:height="1.449cm" svg:x="14.545cm" svg:y="5.715cm">
          <draw:image xlink:href="Pictures/100000010000055B000000478FD7CE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1"> Training Deep NNs (cont.); Introduction to Keras/Tensorflow; Application to Tabular Data</text:span></text:p>
          </draw:text-box>
        </draw:frame>
        <draw:frame presentation:style-name="pr2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Define the initial weights for the network</text:span></text:p>
                <text:list>
                  <text:list-item>
                    <text:p><text:span text:style-name="T2">HE Initialization </text:span></text:p>
                  </text:list-item>
                  <text:list-item>
                    <text:p><text:span text:style-name="T2">Xavier Glorot initialization</text:span></text:p>
                  </text:list-item>
                  <text:list-item>
                    <text:p><text:span text:style-name="T2">If there is a big network and the weight are initially badly then the gradient will explode as you calculate it </text:span></text:p>
                    <text:list>
                      <text:list-item>
                        <text:p><text:span text:style-name="T2">earlier layers and weights will have massive gradients or gradients will vanish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 global minimum does not mean the model is perfect as matter fact it may only on the test data since the future data has its own loss function</text:span></text:p>
                <text:list>
                  <text:list-item>
                    <text:p><text:span text:style-name="T2">What is minimum for the test data may not be minimum for the actual data</text:span></text:p>
                  </text:list-item>
                  <text:list-item>
                    <text:p><text:span text:style-name="T2">Could lead to over fitting</text:span></text:p>
                  </text:list-item>
                </text:list>
              </text:list-item>
              <text:list-item>
                <text:p><text:span text:style-name="T2">Gradient Descent → Stochastic Gradient Descent ( Workhorse for all deep learning )</text:span></text:p>
                <text:list>
                  <text:list-item>
                    <text:p><text:span text:style-name="T2">Problem: For large datasets ( n is in the millions ) computing the gradient loss function can be very expensive</text:span></text:p>
                  </text:list-item>
                  <text:list-item>
                    <text:p><text:span text:style-name="T2">Solution </text:span></text:p>
                    <text:list>
                      <text:list-item>
                        <text:p><text:span text:style-name="T2">At each iteration we randomly choose a few observations ( mini-batch )</text:span></text:p>
                        <text:list>
                          <text:list-item>
                            <text:p><text:span text:style-name="T2">those observations to compute the partial derivatives in the equation below</text:span></text:p>
                          </text:list-item>
                          <text:list-item>
                            <text:p><text:span text:style-name="T2">In every iteration may grab 32 to 64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Strictly speaking SGD uses only one data point, but <text:s/>we use a batch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159cm" svg:height="2.169cm" svg:x="17.145cm" svg:y="8.626cm">
          <draw:image xlink:href="Pictures/1000000100000228000000525FB22D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1"> Training Deep NNs (cont.); Introduction to Keras/Tensorflow; Application to Tabular Data</text:span></text:p>
          </draw:text-box>
        </draw:frame>
        <draw:frame presentation:style-name="pr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only approximates the true gradient</text:span></text:p>
                    <text:list>
                      <text:list-item>
                        <text:p><text:span text:style-name="T2">works well in practice</text:span></text:p>
                      </text:list-item>
                      <text:list-item>
                        <text:p><text:span text:style-name="T2">due to being an approximation it can sometimes escape the local minima</text:span></text:p>
                      </text:list-item>
                    </text:list>
                  </text:list-item>
                  <text:list-item>
                    <text:p><text:span text:style-name="T2">Flavors are Adam, HODL</text:span></text:p>
                  </text:list-item>
                </text:list>
              </text:list-item>
              <text:list-item>
                <text:p><text:span text:style-name="T2">1</text:span><text:span text:style-name="T6">st</text:span><text:span text:style-name="T2"> picture on right is a visualization of a loss function. </text:span></text:p>
              </text:list-item>
              <text:list-item>
                <text:p><text:span text:style-name="T2">Summary of overall training flow</text:span></text:p>
                <text:list>
                  <text:list-item>
                    <text:p><text:span text:style-name="T2">The two layers are the actual layers of neural network so they being updated with the new weights</text:span></text:p>
                  </text:list-item>
                </text:list>
              </text:list-item>
              <text:list-item>
                <text:p><text:span text:style-name="T2">For activation function the back propagation the gradients should not get squished or exploded</text:span></text:p>
                <text:list>
                  <text:list-item>
                    <text:p><text:span text:style-name="T2">Relu is very popular</text:span></text:p>
                    <text:list>
                      <text:list-item>
                        <text:p><text:span text:style-name="T2">As long as the value is positive the gradient is one ( it is neither <text:s/>squashed or exploded )</text:span></text:p>
                      </text:list-item>
                      <text:list-item>
                        <text:p><text:span text:style-name="T2">injecting the minimum amount of linearity to do interesting things.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6.35cm" svg:height="6.587cm" svg:x="19.685cm" svg:y="3.257cm">
          <draw:image xlink:href="Pictures/1000000100000249000002194E038B3E.png" xlink:type="simple" xlink:show="embed" xlink:actuate="onLoad" draw:mime-type="image/png">
            <text:p/>
          </draw:image>
        </draw:frame>
        <draw:frame draw:style-name="gr2" draw:text-style-name="P6" draw:layer="layout" svg:width="9.189cm" svg:height="5.08cm" svg:x="18.415cm" svg:y="10.16cm">
          <draw:image xlink:href="Pictures/100000010000033F000002320D5670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02:02:59.101967000</meta:creation-date>
    <dc:date>2026-05-21T23:50:06.330703000</dc:date>
    <meta:editing-duration>P9DT14H39M24S</meta:editing-duration>
    <meta:editing-cycles>22</meta:editing-cycles>
    <meta:generator>LibreOffice/26.2.3.2$MacOSX_AARCH64 LibreOffice_project/70e089b17412e4cb7773e41413306b17a2328c34</meta:generator>
    <meta:document-statistic meta:object-count="74"/>
  </office:meta>
</office:document-meta>
</file>